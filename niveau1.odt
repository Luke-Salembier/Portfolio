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854a" officeooo:paragraph-rsid="0010854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0854a" officeooo:paragraph-rsid="0010854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15ebe" officeooo:paragraph-rsid="00115eb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12b48a" officeooo:paragraph-rsid="00139d7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officeooo:rsid="0012b48a" officeooo:paragraph-rsid="00139d74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size="10pt" fo:font-weight="normal" officeooo:rsid="0012b48a" officeooo:paragraph-rsid="00139d74" style:font-size-asian="10pt" style:font-weight-asian="normal" style:font-size-complex="10pt" style:font-weight-complex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9" style:family="paragraph" style:parent-style-name="Text_20_body">
      <style:text-properties fo:font-size="10pt" officeooo:rsid="0012b48a" style:font-size-asian="10pt" style:font-size-complex="10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12" style:family="paragraph" style:parent-style-name="Text_20_body" style:list-style-name="L2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fo:font-size="10pt" officeooo:rsid="0012b48a" style:font-size-asian="10pt" style:font-size-complex="10pt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15" style:family="paragraph" style:parent-style-name="Text_20_body" style:list-style-name="L3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12b48a" officeooo:paragraph-rsid="00139d74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12b48a" officeooo:paragraph-rsid="0012b48a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0pt" officeooo:rsid="0012b48a" officeooo:paragraph-rsid="0012b48a" style:font-size-asian="10pt" style:font-size-complex="10pt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20" style:family="paragraph" style:parent-style-name="Text_20_body" style:list-style-name="L4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22" style:family="paragraph" style:parent-style-name="Text_20_body" style:list-style-name="L5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24" style:family="paragraph" style:parent-style-name="Text_20_body" style:list-style-name="L6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26" style:family="paragraph" style:parent-style-name="Text_20_body" style:list-style-name="L7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28" style:family="paragraph" style:parent-style-name="Text_20_body" style:list-style-name="L8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2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30" style:family="paragraph" style:parent-style-name="Text_20_body" style:list-style-name="L9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3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32" style:family="paragraph" style:parent-style-name="Text_20_body" style:list-style-name="L10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3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34" style:family="paragraph" style:parent-style-name="Text_20_body" style:list-style-name="L11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P35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  <style:text-properties fo:font-size="10pt" officeooo:rsid="0012b48a" style:font-size-asian="10pt" style:font-size-complex="10pt"/>
    </style:style>
    <style:style style:name="P36" style:family="paragraph" style:parent-style-name="Text_20_body" style:list-style-name="L12">
      <style:paragraph-properties fo:margin-left="0cm" fo:margin-right="0cm" fo:text-indent="0cm" style:auto-text-indent="false"/>
      <style:text-properties fo:font-size="10pt" officeooo:rsid="0012b48a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9d7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folio</text:p>
      <text:p text:style-name="P2">Salembier Luke</text:p>
      <text:p text:style-name="P2"/>
      <text:p text:style-name="P3"><text:span text:style-name="T1">Mes expériences :</text:span> </text:p>
      <text:p text:style-name="P3"/>
      <text:p text:style-name="P4">Compétences 1 : Concevoir des systèmes industriels 4.0 et 5.0</text:p>
      <text:p text:style-name="P5"><text:span text:style-name="Strong_20_Emphasis"><text:span text:style-name="T2">Niveau 1 : "Analyser un cahier des charges et proposer une solution d'automatisme ou de robotique permettant de le satisfaire" </text:span></text:span><text:span text:style-name="T2">:</text:span></text:p>
      <text:p text:style-name="P6"><text:span text:style-name="Strong_20_Emphasis">Composantes Essentielles</text:span></text:p>
      <text:section text:style-name="Sect1" text:name="yui_3_17_2_1_1771246028463_29">
        <text:list text:style-name="L1">
          <text:list-item>
            <text:p text:style-name="P7"><text:bookmark text:name="yui_3_17_2_1_1771246028463_28"/>CE1.01 : En respectant les normes industrielles.</text:p>
          </text:list-item>
          <text:list-item>
            <text:p text:style-name="P7">CE1.02 : En s'assurant de la réutilisation des parties de code ou de projets.</text:p>
          </text:list-item>
          <text:list-item>
            <text:p text:style-name="P7">CE1.03 : En assurant une veille technologique.</text:p>
          </text:list-item>
          <text:list-item>
            <text:p text:style-name="P8"><text:bookmark text:name="yui_3_17_2_1_1771246028463_27"/>CE1.04 : En communication en français et en anglais avec les différents acteurs impliqués.</text:p>
          </text:list-item>
        </text:list>
      </text:section>
      <text:p text:style-name="P9"/>
      <text:p text:style-name="P10"><text:span text:style-name="Strong_20_Emphasis">Apprentissages Critiques</text:span></text:p>
      <text:section text:style-name="Sect1" text:name="yui_3_17_2_1_1771246028463_45">
        <text:list text:style-name="L2">
          <text:list-item>
            <text:p text:style-name="P11">AC11.01    Analyser les schémas techniques (P&amp;ID, plans mécaniques, schémas électriques) correspondant à l'installation existante d'un client ou à un projet en cours.</text:p>
          </text:list-item>
          <text:list-item>
            <text:p text:style-name="P11">AC11.02    Choisir les capteurs et les actionneurs adaptés aux besoins du client, aux normes correspondant à son secteur d'activité, et à son procédé.</text:p>
          </text:list-item>
          <text:list-item>
            <text:p text:style-name="P11">AC11.03    Concevoir l'Interface Homme Machine (logiciel de supervision, panneau tactile, tablette ou solution mobile), permettant de piloter l'installation localement ou à distance.</text:p>
          </text:list-item>
          <text:list-item>
            <text:p text:style-name="P12">AC11.04    Programmer les automates programmables, les robots, les IHM permettant de répondre au cahier des charges du projet d'automatisme industriel.</text:p>
          </text:list-item>
        </text:list>
      </text:section>
      <text:p text:style-name="P13"><text:span text:style-name="Strong_20_Emphasis">Situations Professionnelles</text:span></text:p>
      <text:list text:style-name="L3">
        <text:list-item>
          <text:p text:style-name="P14">Conception d'une application d'automatisme ou de robotique, en réponse à un cahier des charges.</text:p>
        </text:list-item>
        <text:list-item>
          <text:p text:style-name="P15">Conseil à un client dans le but de lui permettre d'améliorer sa productivité et de la faire évoluer vers une industrie 4.0 ou 5.0.</text:p>
        </text:list-item>
      </text:list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ompétences 2 : <text:span text:style-name="T3">D</text:span>éployer des systèmes industriels 4.0 et 5.0</text:p>
      <text:p text:style-name="P18"><text:bookmark text:name="yui_3_17_2_1_1771245890217_24"/><text:bookmark text:name="yui_3_17_2_1_1771245890217_23"/><text:span text:style-name="Strong_20_Emphasis"><text:span text:style-name="T2">Niveau 1 : "Raccorder et tester le fonctionnement d'une solution d'automatisme ou de robotique." :</text:span></text:span></text:p>
      <text:p text:style-name="P18"><text:span text:style-name="Strong_20_Emphasis">Composantes Essentielles</text:span></text:p>
      <text:list text:style-name="L4">
        <text:list-item>
          <text:p text:style-name="P19">CE2.01 : En se protégeant des risques liés au milieu industriel.</text:p>
        </text:list-item>
        <text:list-item>
          <text:p text:style-name="P19">CE2.02 : En respectant les procédures QHSSE de l’entreprise.</text:p>
        </text:list-item>
        <text:list-item>
          <text:p text:style-name="P20">CE2.03 : En communication en français et en anglais avec les différents acteurs impliqués.</text:p>
        </text:list-item>
      </text:list>
      <text:p text:style-name="P10"/>
      <text:p text:style-name="P13"><text:span text:style-name="Strong_20_Emphasis">Situations Professionnelles</text:span></text:p>
      <text:list text:style-name="L5">
        <text:list-item>
          <text:p text:style-name="P21">Mise en service d'une solution d'automatisme ou de robotique.</text:p>
        </text:list-item>
        <text:list-item>
          <text:p text:style-name="P21">Mise en service d'une supervision ou d'un système de contrôle commande.</text:p>
        </text:list-item>
        <text:list-item>
          <text:p text:style-name="P22">Mise en place et paramétrage d'une infrastructure réseau.</text:p>
        </text:list-item>
      </text:list>
      <text:p text:style-name="P10"/>
      <text:p text:style-name="P13"><text:span text:style-name="Strong_20_Emphasis">Apprentissages Critiques</text:span></text:p>
      <text:list text:style-name="L6">
        <text:list-item>
          <text:p text:style-name="P23">AC12.01    Valider le fonctionnement d'une solution d'automatisme ou de robotique en atelier (FAT).</text:p>
        </text:list-item>
        <text:list-item>
          <text:p text:style-name="P23">AC12.02    Configurer les entrées et sorties d'une solution d'automatisme ou de robotique.</text:p>
        </text:list-item>
        <text:list-item>
          <text:p text:style-name="P23">AC12.03    Raccorder les entrées et sorties d'une solution d'automatisme ou de robotique et vérifier le bon fonctionnement des chaînes d'information ou d'action. (synchronisations)</text:p>
        </text:list-item>
        <text:list-item>
          <text:p text:style-name="P23">AC12.04    Analyser l'architecture réseau d'un client dans le but d'intégrer un composant d'automatisme ou de robotique.</text:p>
        </text:list-item>
        <text:list-item>
          <text:p text:style-name="P24">AC12.05    Valider le fonctionnement d'une solution d'automatisme / de robotique sur site (SAT).</text:p>
        </text:list-item>
      </text:list>
      <text:p text:style-name="P13"><text:line-break/><text:span text:style-name="T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ompétences 3 : <text:span text:style-name="T3">M</text:span>aintenir des systèmes industriels 4.0 et 5.0</text:p>
      <text:p text:style-name="P18"><text:bookmark text:name="yui_3_17_2_1_1771245920016_24"/><text:bookmark text:name="yui_3_17_2_1_1771245920016_23"/><text:span text:style-name="Strong_20_Emphasis"><text:span text:style-name="T2">Niveau 1 : "Assurer la maintenance systématique des outils de production" :</text:span></text:span></text:p>
      <text:p text:style-name="P9"><text:span text:style-name="Strong_20_Emphasis">Composantes Essentielles</text:span></text:p>
      <text:list text:style-name="L7">
        <text:list-item>
          <text:p text:style-name="P25">CE3.01 : En se protégeant des risques liés au milieu industriel,</text:p>
        </text:list-item>
        <text:list-item>
          <text:p text:style-name="P25">CE3.02 : En respectant les procédures QHSSE de l’entreprise,</text:p>
        </text:list-item>
        <text:list-item>
          <text:p text:style-name="P25">CE3.03 : En assurant la traçabilité des opérations.</text:p>
        </text:list-item>
        <text:list-item>
          <text:p text:style-name="P26">CE3.04 : En communication en français et en anglais avec les différents acteurs impliqués.</text:p>
        </text:list-item>
      </text:list>
      <text:p text:style-name="P10"/>
      <text:p text:style-name="P13"><text:span text:style-name="Strong_20_Emphasis">Situations Professionnelles</text:span></text:p>
      <text:list text:style-name="L8">
        <text:list-item>
          <text:p text:style-name="P27">Maintenance systématique des instruments de production.</text:p>
        </text:list-item>
        <text:list-item>
          <text:p text:style-name="P27">Maintenance préventive des instruments de production (industrie 4.0).</text:p>
        </text:list-item>
        <text:list-item>
          <text:p text:style-name="P28">Mise en place de solution de monitoring.</text:p>
        </text:list-item>
      </text:list>
      <text:p text:style-name="P10"/>
      <text:p text:style-name="P13"><text:span text:style-name="Strong_20_Emphasis">Apprentissages Critiques</text:span></text:p>
      <text:list text:style-name="L9">
        <text:list-item>
          <text:p text:style-name="P29">AC13.01    Effectuer la vérification métrologique d'un instrument de mesure.</text:p>
        </text:list-item>
        <text:list-item>
          <text:p text:style-name="P29">AC13.02    Déterminer la durée de vie d'un actionneur, ou d'une pièce d'usure de celui-ci dans le but de planifier des opérations de maintenance systématique.</text:p>
        </text:list-item>
        <text:list-item>
          <text:p text:style-name="P30">AC13.04    Gérer les documents de suivi des instruments (fiches de vie, GMAO)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">Compétences 4 : <text:span text:style-name="T3">Sécuriser </text:span>des systèmes industriels 4.0 et 5.0</text:p>
      <text:p text:style-name="P6"><text:bookmark text:name="yui_3_17_2_1_1771245935696_24"/><text:bookmark text:name="yui_3_17_2_1_1771245935696_23"/><text:span text:style-name="Strong_20_Emphasis"><text:span text:style-name="T2">Niveau 1 : "Connaître les risques liés à l’environnement professionnel et adopter des pratiques permettant de les limiter" :</text:span></text:span></text:p>
      <text:p text:style-name="P9"><text:span text:style-name="Strong_20_Emphasis">Composantes Essentielles</text:span></text:p>
      <text:list text:style-name="L10">
        <text:list-item>
          <text:p text:style-name="P31">CE5.01 : En mesurant et analysant les risques,</text:p>
        </text:list-item>
        <text:list-item>
          <text:p text:style-name="P31">CE5.02 | En respectant les normes et le cadre juridique</text:p>
        </text:list-item>
        <text:list-item>
          <text:p text:style-name="P31">CE5.03 | En intégrant les dernières technologies</text:p>
        </text:list-item>
        <text:list-item>
          <text:p text:style-name="P32">CE5.04 | En sensibilisant efficacement les acteurs concernés</text:p>
        </text:list-item>
      </text:list>
      <text:p text:style-name="P10"/>
      <text:p text:style-name="P13"><text:span text:style-name="Strong_20_Emphasis">Situations Professionnelles</text:span></text:p>
      <text:list text:style-name="L11">
        <text:list-item>
          <text:p text:style-name="P33">Mise en place de mesures de réduction des risques en lien avec la dangerosité du procédé de fabrication.</text:p>
        </text:list-item>
        <text:list-item>
          <text:p text:style-name="P33">Assurer la cybersécurité de l'installation de production.</text:p>
        </text:list-item>
        <text:list-item>
          <text:p text:style-name="P33">Analyse de l’existant et étude des besoins de sécurité</text:p>
        </text:list-item>
        <text:list-item>
          <text:p text:style-name="P34">Évolution et mise en conformité de l’installation d’une entreprise</text:p>
        </text:list-item>
      </text:list>
      <text:p text:style-name="P13"><text:line-break/><text:span text:style-name="Strong_20_Emphasis">Apprentissages Critiques</text:span></text:p>
      <text:list text:style-name="L12">
        <text:list-item>
          <text:p text:style-name="P35">AC15.01    Identifier les risques liés au procédé de fabrication.</text:p>
        </text:list-item>
        <text:list-item>
          <text:p text:style-name="P35">AC15.02    Se protéger des risques électriques.</text:p>
        </text:list-item>
        <text:list-item>
          <text:p text:style-name="P35">AC15.03    Connaître les principaux types d’attaque informatique, les failles sur lesquelles elles s’appuient et les remédiations associées</text:p>
        </text:list-item>
        <text:list-item>
          <text:p text:style-name="P36">AC15.04    Connaître et utiliser les bonnes pratiques et les recommandations de cybersécurité</text:p>
        </text:list-item>
      </text:list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3:32:48.671377200</meta:creation-date>
    <dc:date>2026-02-16T13:50:40.196562800</dc:date>
    <meta:editing-duration>PT17M9S</meta:editing-duration>
    <meta:editing-cycles>10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68" meta:word-count="714" meta:character-count="4753" meta:non-whitespace-character-count="4096"/>
  </office:meta>
</office:document-meta>
</file>